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DB8F1B9E.jpg" manifest:media-type="image/jpeg"/>
  <manifest:file-entry manifest:full-path="Pictures/1000000100000240000002A0D9B8C06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6243in" table:align="left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0.641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868in" table:align="left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0.7125in"/>
    </style:style>
    <style:style style:name="Table2.C" style:family="table-column">
      <style:table-column-properties style:column-width="0.73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8944in" table:align="left"/>
    </style:style>
    <style:style style:name="Table3.A" style:family="table-column">
      <style:table-column-properties style:column-width="0.9257in"/>
    </style:style>
    <style:style style:name="Table3.B" style:family="table-column">
      <style:table-column-properties style:column-width="1.96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5521in" table:align="left"/>
    </style:style>
    <style:style style:name="Table4.A" style:family="table-column">
      <style:table-column-properties style:column-width="0.6951in"/>
    </style:style>
    <style:style style:name="Table4.B" style:family="table-column">
      <style:table-column-properties style:column-width="0.85in"/>
    </style:style>
    <style:style style:name="Table4.C" style:family="table-column">
      <style:table-column-properties style:column-width="1.006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paragraph-rsid="000201e6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break-before="page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able_20_Contents">
      <style:text-properties fo:language="en" fo:country="US" officeooo:rsid="000201e6" officeooo:paragraph-rsid="000201e6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1"/>
    <style:style style:name="T1" style:family="text">
      <style:text-properties officeooo:rsid="000201e6"/>
    </style:style>
    <style:style style:name="T2" style:family="text">
      <style:text-properties fo:language="hu" fo:country="HU" officeooo:rsid="000201e6"/>
    </style:style>
    <style:style style:name="T3" style:family="text">
      <style:text-properties fo:language="en" fo:country="US" officeooo:rsid="00020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563in, 0in, 1.05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Documentation Structure</text:h>
      <text:h text:style-name="Heading_20_2" text:outline-level="2">1. Cover Page</text:h>
      <text:list text:style-name="L1">
        <text:list-item>
          <text:p text:style-name="P1">Product name : <text:span text:style-name="T1">Pico IO Board</text:span><draw:frame draw:style-name="fr1" draw:name="Image1" text:anchor-type="char" svg:x="3.8575in" svg:y="0.0425in" svg:width="2.9835in" svg:height="3.5319in" draw:z-index="0"><draw:image xlink:href="Pictures/100000000000040000000400DB8F1B9E.jpg" xlink:type="simple" xlink:show="embed" xlink:actuate="onLoad" draw:mime-type="image/jpeg"/></draw:frame></text:p>
        </text:list-item>
        <text:list-item>
          <text:p text:style-name="P1">Revision/version <text:s/><text:span text:style-name="T1">v1.1</text:span></text:p>
        </text:list-item>
        <text:list-item>
          <text:p text:style-name="P1">Hero render </text:p>
        </text:list-item>
        <text:list-item>
          <text:p text:style-name="P2">Short description </text:p>
          <text:p text:style-name="P2">The Mechaxil Pico IO Board expands the Raspberry Pi Pico pins so it's easier to use for prototyping.</text:p>
          <text:p text:style-name="P1">Designed with usability, readability, and clean aesthetics in mind.</text:p>
        </text:list-item>
        <text:list-item>
          <text:p text:style-name="P1">Perfect for prototyping, education, embedded development, and quick testing setups.</text:p>
          <text:p text:style-name="P1"/>
        </text:list-item>
        <text:list-item>
          <text:p text:style-name="P1">Status :Production </text:p>
        </text:list-item>
        <text:list-item>
          <text:p text:style-name="P1">License : <text:span text:style-name="T1">CERN-Open Hardware License Version 2 – Weakly Reciprocal (CERN-OHL-W)</text:span></text:p>
        </text:list-item>
        <text:list-item>
          <text:p text:style-name="P1">Author/company :<text:span text:style-name="T2"> Attila</text:span> <text:span text:style-name="T3">Závoczki</text:span><text:span text:style-name="T2"> </text:span><text:span text:style-name="T3">| Mechaxil</text:span></text:p>
        </text:list-item>
        <text:list-item>
          <text:p text:style-name="P1">Date <text:span text:style-name="T3">2026.05.10</text:span></text:p>
        </text:list-item>
        <text:list-item>
          <text:p text:style-name="P3">Certifications/logos (OSHWA etc.) </text:p>
        </text:list-item>
      </text:list>
      <text:p text:style-name="Text_20_body">Example style:</text:p>
      <text:list text:style-name="L2">
        <text:list-item>
          <text:p text:style-name="P4">big render on white/light gray </text:p>
        </text:list-item>
        <text:list-item>
          <text:p text:style-name="P4">small metadata block on side </text:p>
        </text:list-item>
        <text:list-item>
          <text:p text:style-name="P5">subtle accent color only </text:p>
        </text:list-item>
        <text:list-item>
          <text:p text:style-name="P6"/>
        </text:list-item>
      </text:list>
      <text:h text:style-name="Heading_20_2" text:outline-level="2">2. Overview</text:h>
      <text:p text:style-name="Text_20_body">Purpose of the board/product.</text:p>
      <text:p text:style-name="Text_20_body">Should answer:</text:p>
      <text:list text:style-name="L3">
        <text:list-item>
          <text:p text:style-name="P7">What is it? </text:p>
        </text:list-item>
        <text:list-item>
          <text:p text:style-name="P7">Who is it for? </text:p>
        </text:list-item>
        <text:list-item>
          <text:p text:style-name="P7">What problem does it solve? </text:p>
        </text:list-item>
        <text:list-item>
          <text:p text:style-name="P8">Main capabilities </text:p>
        </text:list-item>
      </text:list>
      <text:p text:style-name="Text_20_body">Include:</text:p>
      <text:list text:style-name="L4">
        <text:list-item>
          <text:p text:style-name="P9">short feature list </text:p>
        </text:list-item>
        <text:list-item>
          <text:p text:style-name="P9">block diagram </text:p>
        </text:list-item>
        <text:list-item>
          <text:p text:style-name="P10">product highlights </text:p>
        </text:list-item>
      </text:list>
      <text:h text:style-name="Heading_20_2" text:outline-level="2">3. Hardware Specifications</text:h>
      <text:p text:style-name="Text_20_body">Very STM/NXP style section.</text:p>
      <text:p text:style-name="Text_20_body">Table format works best.</text:p>
      <text:p text:style-name="Text_20_body">Exampl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Input Voltage</text:p>
          </table:table-cell>
          <table:table-cell table:style-name="Table1.A1" office:value-type="string">
            <text:p text:style-name="Table_20_Contents">5V</text:p>
          </table:table-cell>
        </table:table-row>
        <table:table-row>
          <table:table-cell table:style-name="Table1.A1" office:value-type="string">
            <text:p text:style-name="Table_20_Contents">MCU</text:p>
          </table:table-cell>
          <table:table-cell table:style-name="Table1.A1" office:value-type="string">
            <text:p text:style-name="Table_20_Contents">RP2040</text:p>
          </table:table-cell>
        </table:table-row>
        <table:table-row>
          <table:table-cell table:style-name="Table1.A1" office:value-type="string">
            <text:p text:style-name="Table_20_Contents">GPIO Count</text:p>
          </table:table-cell>
          <table:table-cell table:style-name="Table1.A1" office:value-type="string">
            <text:p text:style-name="P11">40</text:p>
          </table:table-cell>
        </table:table-row>
        <table:table-row>
          <table:table-cell table:style-name="Table1.A1" office:value-type="string">
            <text:p text:style-name="Table_20_Contents">Logic Level</text:p>
          </table:table-cell>
          <table:table-cell table:style-name="Table1.A1" office:value-type="string">
            <text:p text:style-name="Table_20_Contents">3.3V</text:p>
          </table:table-cell>
        </table:table-row>
        <table:table-row>
          <table:table-cell table:style-name="Table1.A1" office:value-type="string">
            <text:p text:style-name="Table_20_Contents">Dimensions</text:p>
          </table:table-cell>
          <table:table-cell table:style-name="Table1.A1" office:value-type="string">
            <text:p text:style-name="Table_20_Contents">xx mm</text:p>
          </table:table-cell>
        </table:table-row>
      </table:table>
      <text:p text:style-name="Text_20_body">Keep this extremely clean.</text:p>
      <text:h text:style-name="Heading_20_2" text:outline-level="2">4. Board Layout &amp; Identification</text:h>
      <text:p text:style-name="Text_20_body">This section is SUPER important.</text:p>
      <text:p text:style-name="Text_20_body">Include:</text:p>
      <text:list text:style-name="L5">
        <text:list-item>
          <text:p text:style-name="P12">top PCB render </text:p>
        </text:list-item>
        <text:list-item>
          <text:p text:style-name="P12">bottom PCB render </text:p>
        </text:list-item>
        <text:list-item>
          <text:p text:style-name="P12">labeled connectors </text:p>
        </text:list-item>
        <text:list-item>
          <text:p text:style-name="P12">dimensions </text:p>
        </text:list-item>
        <text:list-item>
          <text:p text:style-name="P12">mounting holes </text:p>
        </text:list-item>
        <text:list-item>
          <text:p text:style-name="P13">important component callouts </text:p>
        </text:list-item>
      </text:list>
      <text:p text:style-name="Text_20_body">Should visually resemble datasheet-style diagrams.</text:p>
      <text:h text:style-name="Heading_20_2" text:outline-level="2"><text:soft-page-break/>5. Real Product Photos</text:h>
      <text:p text:style-name="Text_20_body">You already identified this correctly.</text:p>
      <text:p text:style-name="Text_20_body">Include:</text:p>
      <text:list text:style-name="L6">
        <text:list-item>
          <text:p text:style-name="P14">assembled photos </text:p>
        </text:list-item>
        <text:list-item>
          <text:p text:style-name="P14">angled shots </text:p>
        </text:list-item>
        <text:list-item>
          <text:p text:style-name="P14">closeups </text:p>
        </text:list-item>
        <text:list-item>
          <text:p text:style-name="P14">connector detail shots </text:p>
        </text:list-item>
        <text:list-item>
          <text:p text:style-name="P15">scale reference if useful </text:p>
        </text:list-item>
      </text:list>
      <text:p text:style-name="Text_20_body">Important:<text:line-break/>Use consistent lighting/background.<text:line-break/>TI/ST style works because visuals feel "controlled".</text:p>
      <text:h text:style-name="Heading_20_2" text:outline-level="2">6. Included Hardware / BOM</text:h>
      <text:p text:style-name="Text_20_body">This is one of the biggest missing things in open hardware docs.</text:p>
      <text:p text:style-name="Text_20_body">Should include:</text:p>
      <text:list text:style-name="L7">
        <text:list-item>
          <text:p text:style-name="P16">screws </text:p>
        </text:list-item>
        <text:list-item>
          <text:p text:style-name="P16">spacers </text:p>
        </text:list-item>
        <text:list-item>
          <text:p text:style-name="P16">inserts </text:p>
        </text:list-item>
        <text:list-item>
          <text:p text:style-name="P16">connectors </text:p>
        </text:list-item>
        <text:list-item>
          <text:p text:style-name="P16">optional parts </text:p>
        </text:list-item>
        <text:list-item>
          <text:p text:style-name="P17">tools required </text:p>
        </text:list-item>
      </text:list>
      <text:p text:style-name="Text_20_body">Exampl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tem</text:p>
            </table:table-cell>
            <table:table-cell table:style-name="Table2.A1" office:value-type="string">
              <text:p text:style-name="Table_20_Heading">Quantity</text:p>
            </table:table-cell>
            <table:table-cell table:style-name="Table2.A1" office:value-type="string">
              <text:p text:style-name="Table_20_Heading">Included</text:p>
            </table:table-cell>
          </table:table-row>
        </table:table-header-rows>
        <table:table-row>
          <table:table-cell table:style-name="Table2.A1" office:value-type="string">
            <text:p text:style-name="Table_20_Contents">M3x8 Screw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Brass Insert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No</text:p>
          </table:table-cell>
        </table:table-row>
        <table:table-row>
          <table:table-cell table:style-name="Table2.A1" office:value-type="string">
            <text:p text:style-name="Table_20_Contents">JST Cable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Yes</text:p>
          </table:table-cell>
        </table:table-row>
      </table:table>
      <text:p text:style-name="Text_20_body">Could also split:</text:p>
      <text:list text:style-name="L8">
        <text:list-item>
          <text:p text:style-name="P18">Required </text:p>
        </text:list-item>
        <text:list-item>
          <text:p text:style-name="P18">Optional </text:p>
        </text:list-item>
        <text:list-item>
          <text:p text:style-name="P19">Recommended </text:p>
        </text:list-item>
      </text:list>
      <text:h text:style-name="Heading_20_2" text:outline-level="2">7. CAD Files</text:h>
      <text:p text:style-name="Text_20_body">You already nailed the important part.</text:p>
      <text:p text:style-name="Text_20_body">VERY important section.</text:p>
      <text:p text:style-name="Text_20_body">Should contain:</text:p>
      <text:list text:style-name="L9">
        <text:list-item>
          <text:p text:style-name="P20">Native CAD </text:p>
        </text:list-item>
        <text:list-item>
          <text:p text:style-name="P20">STEP </text:p>
        </text:list-item>
        <text:list-item>
          <text:p text:style-name="P20">STL (if relevant) </text:p>
        </text:list-item>
        <text:list-item>
          <text:p text:style-name="P20"><text:soft-page-break/>Drawings </text:p>
        </text:list-item>
        <text:list-item>
          <text:p text:style-name="P20">PCB source </text:p>
        </text:list-item>
        <text:list-item>
          <text:p text:style-name="P21">Export formats </text:p>
        </text:list-item>
      </text:list>
      <text:p text:style-name="Text_20_body">Explain WHY:</text:p>
      <text:list text:style-name="L10">
        <text:list-item>
          <text:p text:style-name="P22">native for editing </text:p>
        </text:list-item>
        <text:list-item>
          <text:p text:style-name="P22">STEP for compatibility </text:p>
        </text:list-item>
        <text:list-item>
          <text:p text:style-name="P23">STL for printing </text:p>
        </text:list-item>
      </text:list>
      <text:p text:style-name="Text_20_body">I’d also include:</text:p>
      <text:list text:style-name="L11">
        <text:list-item>
          <text:p text:style-name="P24">software version used </text:p>
        </text:list-item>
        <text:list-item>
          <text:p text:style-name="P24">export revision </text:p>
        </text:list-item>
        <text:list-item>
          <text:p text:style-name="P25">unit system </text:p>
        </text:list-item>
      </text:list>
      <text:h text:style-name="Heading_20_2" text:outline-level="2">8. Mechanical Assembly</text:h>
      <text:p text:style-name="Text_20_body">Probably the most important section after specs.</text:p>
      <text:p text:style-name="Text_20_body">Must contain:</text:p>
      <text:list text:style-name="L12">
        <text:list-item>
          <text:p text:style-name="P26">exploded view </text:p>
        </text:list-item>
        <text:list-item>
          <text:p text:style-name="P26">assembly order </text:p>
        </text:list-item>
        <text:list-item>
          <text:p text:style-name="P26">screw lengths </text:p>
        </text:list-item>
        <text:list-item>
          <text:p text:style-name="P26">torque notes if relevant </text:p>
        </text:list-item>
        <text:list-item>
          <text:p text:style-name="P26">cable routing </text:p>
        </text:list-item>
        <text:list-item>
          <text:p text:style-name="P26">alignment warnings </text:p>
        </text:list-item>
        <text:list-item>
          <text:p text:style-name="P27">tolerances if needed </text:p>
        </text:list-item>
      </text:list>
      <text:p text:style-name="Text_20_body">Very visual section.</text:p>
      <text:p text:style-name="Text_20_body">Think IKEA manual + industrial assembly guide hybrid.</text:p>
      <text:h text:style-name="Heading_20_2" text:outline-level="2">9. Assembly Skill Level</text:h>
      <text:p text:style-name="Text_20_body">This is actually genius and almost nobody does it.</text:p>
      <text:p text:style-name="Text_20_body">Could b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kill Level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Beginner</text:p>
          </table:table-cell>
          <table:table-cell table:style-name="Table3.A1" office:value-type="string">
            <text:p text:style-name="Table_20_Contents">Basic screwdriver assembly</text:p>
          </table:table-cell>
        </table:table-row>
        <table:table-row>
          <table:table-cell table:style-name="Table3.A1" office:value-type="string">
            <text:p text:style-name="Table_20_Contents">Intermediate</text:p>
          </table:table-cell>
          <table:table-cell table:style-name="Table3.A1" office:value-type="string">
            <text:p text:style-name="Table_20_Contents">Requires soldering</text:p>
          </table:table-cell>
        </table:table-row>
        <table:table-row>
          <table:table-cell table:style-name="Table3.A1" office:value-type="string">
            <text:p text:style-name="Table_20_Contents">Advanced</text:p>
          </table:table-cell>
          <table:table-cell table:style-name="Table3.A1" office:value-type="string">
            <text:p text:style-name="Table_20_Contents">Requires calibration/rework</text:p>
          </table:table-cell>
        </table:table-row>
      </table:table>
      <text:p text:style-name="Text_20_body">Then:</text:p>
      <text:list text:style-name="L13">
        <text:list-item>
          <text:p text:style-name="P28">soldering difficulty </text:p>
        </text:list-item>
        <text:list-item>
          <text:p text:style-name="P28">tools required </text:p>
        </text:list-item>
        <text:list-item>
          <text:p text:style-name="P28">estimated time </text:p>
        </text:list-item>
        <text:list-item>
          <text:p text:style-name="P29">safety warnings </text:p>
        </text:list-item>
      </text:list>
      <text:h text:style-name="Heading_20_2" text:outline-level="2"><text:soft-page-break/>10. Assembly Videos</text:h>
      <text:p text:style-name="Text_20_body">This should be integrated directly inside docs.</text:p>
      <text:p text:style-name="Text_20_body">For difficult operations:</text:p>
      <text:list text:style-name="L14">
        <text:list-item>
          <text:p text:style-name="P30">soldering connectors </text:p>
        </text:list-item>
        <text:list-item>
          <text:p text:style-name="P30">press fitting </text:p>
        </text:list-item>
        <text:list-item>
          <text:p text:style-name="P30">cable routing </text:p>
        </text:list-item>
        <text:list-item>
          <text:p text:style-name="P30">calibration </text:p>
        </text:list-item>
        <text:list-item>
          <text:p text:style-name="P31">firmware flashing </text:p>
        </text:list-item>
      </text:list>
      <text:p text:style-name="Text_20_body">Add:</text:p>
      <text:list text:style-name="L15">
        <text:list-item>
          <text:p text:style-name="P32">QR code </text:p>
        </text:list-item>
        <text:list-item>
          <text:p text:style-name="P33">direct links </text:p>
        </text:list-item>
      </text:list>
      <text:p text:style-name="Text_20_body">NXP/ST style docs usually lack this because they target professionals, but for open hardware this is HUGE.</text:p>
      <text:h text:style-name="Heading_20_2" text:outline-level="2">11. Electrical Overview</text:h>
      <text:p text:style-name="Text_20_body">Include:</text:p>
      <text:list text:style-name="L16">
        <text:list-item>
          <text:p text:style-name="P34">simplified schematic </text:p>
        </text:list-item>
        <text:list-item>
          <text:p text:style-name="P34">power tree </text:p>
        </text:list-item>
        <text:list-item>
          <text:p text:style-name="P34">IO explanation </text:p>
        </text:list-item>
        <text:list-item>
          <text:p text:style-name="P34">protection circuitry </text:p>
        </text:list-item>
        <text:list-item>
          <text:p text:style-name="P35">connector pinouts </text:p>
        </text:list-item>
      </text:list>
      <text:p text:style-name="Text_20_body">Not full KiCad spaghetti directly.<text:line-break/>Use simplified diagrams first.</text:p>
      <text:h text:style-name="Heading_20_2" text:outline-level="2">12. Manufacturing Information</text:h>
      <text:p text:style-name="Text_20_body">This makes the project feel serious instantly.</text:p>
      <text:p text:style-name="Text_20_body">Include:</text:p>
      <text:list text:style-name="L17">
        <text:list-item>
          <text:p text:style-name="P36">PCB stackup </text:p>
        </text:list-item>
        <text:list-item>
          <text:p text:style-name="P36">thickness </text:p>
        </text:list-item>
        <text:list-item>
          <text:p text:style-name="P36">copper weight </text:p>
        </text:list-item>
        <text:list-item>
          <text:p text:style-name="P36">surface finish </text:p>
        </text:list-item>
        <text:list-item>
          <text:p text:style-name="P36">assembly notes </text:p>
        </text:list-item>
        <text:list-item>
          <text:p text:style-name="P36">recommended manufacturers </text:p>
        </text:list-item>
        <text:list-item>
          <text:p text:style-name="P37">critical tolerances </text:p>
        </text:list-item>
      </text:list>
      <text:h text:style-name="Heading_20_2" text:outline-level="2">13. Firmware / Software</text:h>
      <text:p text:style-name="Text_20_body">Include:</text:p>
      <text:list text:style-name="L18">
        <text:list-item>
          <text:p text:style-name="P38">flashing instructions </text:p>
        </text:list-item>
        <text:list-item>
          <text:p text:style-name="P38"><text:soft-page-break/>dependencies </text:p>
        </text:list-item>
        <text:list-item>
          <text:p text:style-name="P38">supported platforms </text:p>
        </text:list-item>
        <text:list-item>
          <text:p text:style-name="P38">examples </text:p>
        </text:list-item>
        <text:list-item>
          <text:p text:style-name="P38">pin mappings </text:p>
        </text:list-item>
        <text:list-item>
          <text:p text:style-name="P39">debug interfaces </text:p>
        </text:list-item>
      </text:list>
      <text:h text:style-name="Heading_20_2" text:outline-level="2">14. Validation &amp; Testing</text:h>
      <text:p text:style-name="Text_20_body">SUPER underrated.</text:p>
      <text:p text:style-name="Text_20_body">Include:</text:p>
      <text:list text:style-name="L19">
        <text:list-item>
          <text:p text:style-name="P40">tested voltages </text:p>
        </text:list-item>
        <text:list-item>
          <text:p text:style-name="P40">stress tests </text:p>
        </text:list-item>
        <text:list-item>
          <text:p text:style-name="P40">thermal tests </text:p>
        </text:list-item>
        <text:list-item>
          <text:p text:style-name="P40">known limitations </text:p>
        </text:list-item>
        <text:list-item>
          <text:p text:style-name="P41">QA checklist </text:p>
        </text:list-item>
      </text:list>
      <text:p text:style-name="Text_20_body">Makes project feel trustworthy.</text:p>
      <text:h text:style-name="Heading_20_2" text:outline-level="2">15. Revision History</text:h>
      <text:p text:style-name="Text_20_body">Very important for hardware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Revision</text:p>
            </table:table-cell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Changes</text:p>
            </table:table-cell>
          </table:table-row>
        </table:table-header-rows>
        <table:table-row>
          <table:table-cell table:style-name="Table4.A1" office:value-type="string">
            <text:p text:style-name="Table_20_Contents">v1.0</text:p>
          </table:table-cell>
          <table:table-cell table:style-name="Table4.A1" office:value-type="string">
            <text:p text:style-name="Table_20_Contents">2026-05-10</text:p>
          </table:table-cell>
          <table:table-cell table:style-name="Table4.A1" office:value-type="string">
            <text:p text:style-name="Table_20_Contents">Initial release</text:p>
          </table:table-cell>
        </table:table-row>
      </table:table>
      <text:h text:style-name="Heading_20_2" text:outline-level="2">16. Licensing &amp; Open Source</text:h>
      <text:p text:style-name="Text_20_body">Include:</text:p>
      <text:list text:style-name="L20">
        <text:list-item>
          <text:p text:style-name="P42">hardware license </text:p>
        </text:list-item>
        <text:list-item>
          <text:p text:style-name="P42">software license </text:p>
        </text:list-item>
        <text:list-item>
          <text:p text:style-name="P42">documentation license </text:p>
        </text:list-item>
        <text:list-item>
          <text:p text:style-name="P43">attribution requirements </text:p>
        </text:list-item>
      </text:list>
      <text:h text:style-name="Heading_20_2" text:outline-level="2">17. Support &amp; Community</text:h>
      <text:list text:style-name="L21">
        <text:list-item>
          <text:p text:style-name="P44">GitHub </text:p>
        </text:list-item>
        <text:list-item>
          <text:p text:style-name="P44">Discord </text:p>
        </text:list-item>
        <text:list-item>
          <text:p text:style-name="P44">issue tracker </text:p>
        </text:list-item>
        <text:list-item>
          <text:p text:style-name="P45">contribution guidelines</text:p>
        </text:list-item>
      </text:list>
      <text:p text:style-name="Standard"><draw:frame draw:style-name="fr2" draw:name="Image2" text:anchor-type="char" svg:width="3.0437in" svg:height="3.5516in" draw:z-index="1"><draw:image xlink:href="Pictures/1000000100000240000002A0D9B8C0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0T11:06:19.215597100</meta:creation-date>
    <dc:date>2026-05-10T15:38:27.959274300</dc:date>
    <meta:editing-duration>PT1H4M55S</meta:editing-duration>
    <meta:editing-cycles>3</meta:editing-cycles>
    <meta:generator>LibreOffice/25.8.5.2$Windows_X86_64 LibreOffice_project/9c8b85f387cc00a89945a79c9e6239f32e450ac2</meta:generator>
    <meta:document-statistic meta:table-count="4" meta:image-count="2" meta:object-count="0" meta:page-count="6" meta:paragraph-count="205" meta:word-count="660" meta:character-count="3996" meta:non-whitespace-character-count="3548"/>
  </office:meta>
</office:document-meta>
</file>